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Q1</text:p>
      <text:p text:style-name="Normal"/>
      <text:p text:style-name="Normal">Determine the time complexity:<text:s text:c="7"/>O(n)</text:p>
      <text:p text:style-name="Normal"/>
      <text:p text:style-name="Normal">for(int i=0;i&lt;n;i++)</text:p>
      <text:p text:style-name="Normal">{</text:p>
      <text:p text:style-name="Normal">    cout&lt;&lt;i;</text:p>
      <text:p text:style-name="Normal">}                                          <text:s/></text:p>
      <text:p text:style-name="Normal">Q2</text:p>
      <text:p text:style-name="Normal"/>
      <text:p text:style-name="Normal">Determine the time complexity:<text:s text:c="5"/>O(n^2)</text:p>
      <text:p text:style-name="Normal"/>
      <text:p text:style-name="Normal">for(int i=0;i&lt;n;i++)</text:p>
      <text:p text:style-name="Normal">{</text:p>
      <text:p text:style-name="Normal">    for(int j=0;j&lt;n;j++)</text:p>
      <text:p text:style-name="Normal">    {</text:p>
      <text:p text:style-name="Normal">        cout&lt;&lt;"*";</text:p>
      <text:p text:style-name="Normal">    }</text:p>
      <text:p text:style-name="Normal">}  </text:p>
      <text:p text:style-name="Normal">Q3</text:p>
      <text:p text:style-name="Normal"/>
      <text:p text:style-name="Normal">Determine the time complexity:<text:s text:c="6"/>O(n^2)</text:p>
      <text:p text:style-name="Normal"/>
      <text:p text:style-name="Normal">for(int i=0;i&lt;n;i++)</text:p>
      <text:p text:style-name="Normal">{</text:p>
      <text:p text:style-name="Normal">    for(int j=0;j&lt;i;j++)</text:p>
      <text:p text:style-name="Normal">    {</text:p>
      <text:p text:style-name="Normal">        cout&lt;&lt;"*";</text:p>
      <text:soft-page-break/>
      <text:p text:style-name="Normal">    }</text:p>
      <text:p text:style-name="Normal">}</text:p>
      <text:p text:style-name="Normal">Q4</text:p>
      <text:p text:style-name="Normal"/>
      <text:p text:style-name="Normal">Determine the time complexity:<text:s text:c="6"/>O(log n)</text:p>
      <text:p text:style-name="Normal"/>
      <text:p text:style-name="Normal">for(int i=1;i&lt;n;i*=2)</text:p>
      <text:p text:style-name="Normal">{</text:p>
      <text:p text:style-name="Normal">    cout&lt;&lt;i;</text:p>
      <text:p text:style-name="Normal">}</text:p>
      <text:p text:style-name="Normal">Q5</text:p>
      <text:p text:style-name="Normal"/>
      <text:p text:style-name="Normal">Determine the time complexity:<text:s text:c="6"/>O(log n)</text:p>
      <text:p text:style-name="Normal"/>
      <text:p text:style-name="Normal">for(int i=n;i&gt;1;i/=2)</text:p>
      <text:p text:style-name="Normal">{</text:p>
      <text:p text:style-name="Normal">    cout&lt;&lt;i;</text:p>
      <text:p text:style-name="Normal">}</text:p>
      <text:p text:style-name="Normal">Q6</text:p>
      <text:p text:style-name="Normal"/>
      <text:p text:style-name="Normal">Determine the time complexity:<text:s text:c="6"/>O(nlog n)</text:p>
      <text:p text:style-name="Normal"/>
      <text:p text:style-name="Normal">for(int i=1;i&lt;=n;i++)</text:p>
      <text:p text:style-name="Normal">{</text:p>
      <text:p text:style-name="Normal">    for(int j=1;j&lt;=log(n);j++)</text:p>
      <text:p text:style-name="Normal">    {</text:p>
      <text:p text:style-name="Normal">        cout&lt;&lt;"*";</text:p>
      <text:p text:style-name="Normal">    }</text:p>
      <text:soft-page-break/>
      <text:p text:style-name="Normal">}</text:p>
      <text:p text:style-name="Normal">Q7</text:p>
      <text:p text:style-name="Normal"/>
      <text:p text:style-name="Normal">Determine the time complexity:<text:s text:c="7"/>O(n)</text:p>
      <text:p text:style-name="Normal"/>
      <text:p text:style-name="Normal">while(n&gt;0)</text:p>
      <text:p text:style-name="Normal">{</text:p>
      <text:p text:style-name="Normal">    n--;</text:p>
      <text:p text:style-name="Normal">}</text:p>
      <text:p text:style-name="Normal">Q8</text:p>
      <text:p text:style-name="Normal"/>
      <text:p text:style-name="Normal">Determine the time complexity:<text:s text:c="8"/>O(log n)</text:p>
      <text:p text:style-name="Normal"/>
      <text:p text:style-name="Normal">while(n&gt;1)</text:p>
      <text:p text:style-name="Normal">{</text:p>
      <text:p text:style-name="Normal">    n/=2;</text:p>
      <text:p text:style-name="Normal">}</text:p>
      <text:p text:style-name="Normal">Q9</text:p>
      <text:p text:style-name="Normal"/>
      <text:p text:style-name="Normal">Determine the time complexity:<text:s text:c="7"/>O(n)</text:p>
      <text:p text:style-name="Normal"/>
      <text:p text:style-name="Normal">for(int i=1;i&lt;=n;i++)</text:p>
      <text:p text:style-name="Normal">{</text:p>
      <text:p text:style-name="Normal">}</text:p>
      <text:p text:style-name="Normal">for(int j=1;j&lt;=n;j++)</text:p>
      <text:p text:style-name="Normal">{</text:p>
      <text:p text:style-name="Normal">}</text:p>
      <text:p text:style-name="Normal">Q10</text:p>
      <text:p text:style-name="Normal"/>
      <text:p text:style-name="Normal">Determine the time complexity:<text:s text:c="6"/>O(n^2)</text:p>
      <text:p text:style-name="Normal"/>
      <text:p text:style-name="Normal">for(int i=1;i&lt;=n;i++)</text:p>
      <text:p text:style-name="Normal">{</text:p>
      <text:p text:style-name="Normal">}</text:p>
      <text:p text:style-name="Normal">for(int j=1;j&lt;=n*n;j++)</text:p>
      <text:p text:style-name="Normal">{</text:p>
      <text:p text:style-name="Normal">}</text:p>
      <text:p text:style-name="Normal">Q11</text:p>
      <text:p text:style-name="Normal"/>
      <text:p text:style-name="Normal">Determine the time complexity:<text:s text:c="6"/>O(n^3)</text:p>
      <text:p text:style-name="Normal"/>
      <text:p text:style-name="Normal">for(int i=1;i&lt;=n;i++)</text:p>
      <text:p text:style-name="Normal">{</text:p>
      <text:p text:style-name="Normal">    for(int j=1;j&lt;=n*n;j++)</text:p>
      <text:p text:style-name="Normal">    {</text:p>
      <text:p text:style-name="Normal">    }</text:p>
      <text:p text:style-name="Normal">}</text:p>
      <text:p text:style-name="Normal">Q12</text:p>
      <text:p text:style-name="Normal"/>
      <text:p text:style-name="Normal">Determine the time complexity:</text:p>
      <text:p text:style-name="Normal"/>
      <text:p text:style-name="Normal">for(int i=1;i&lt;=n;i*=3)<text:s text:c="5"/>O(log n)- Here log is base 3</text:p>
      <text:p text:style-name="Normal">{</text:p>
      <text:p text:style-name="Normal">}</text:p>
      <text:p text:style-name="Normal">Q13</text:p>
      <text:p text:style-name="Normal"/>
      <text:soft-page-break/>
      <text:p text:style-name="Normal">Determine the time complexity:<text:s text:c="7"/>O(n^2)</text:p>
      <text:p text:style-name="Normal"/>
      <text:p text:style-name="Normal">for(int i=1;i&lt;=n;i++)</text:p>
      <text:p text:style-name="Normal">{</text:p>
      <text:p text:style-name="Normal">    for(int j=1;j&lt;=i*i;j++)</text:p>
      <text:p text:style-name="Normal">    {</text:p>
      <text:p text:style-name="Normal">    }</text:p>
      <text:p text:style-name="Normal">}</text:p>
      <text:p text:style-name="Normal">Q14</text:p>
      <text:p text:style-name="Normal"/>
      <text:p text:style-name="Normal">Determine the time complexity:<text:s text:c="4"/>O(n)</text:p>
      <text:p text:style-name="Normal"/>
      <text:p text:style-name="Normal">void fun(int n)</text:p>
      <text:p text:style-name="Normal">{</text:p>
      <text:p text:style-name="Normal">    if(n==0)</text:p>
      <text:p text:style-name="Normal">        return;</text:p>
      <text:p text:style-name="Normal"/>
      <text:p text:style-name="Normal">    fun(n-1);</text:p>
      <text:p text:style-name="Normal">}</text:p>
      <text:p text:style-name="Normal">Q15</text:p>
      <text:p text:style-name="Normal"/>
      <text:p text:style-name="Normal">Determine the time complexity:<text:s text:c="4"/>O(log n)</text:p>
      <text:p text:style-name="Normal"/>
      <text:p text:style-name="Normal">void fun(int n)</text:p>
      <text:p text:style-name="Normal">{</text:p>
      <text:p text:style-name="Normal">    if(n&lt;=1)</text:p>
      <text:p text:style-name="Normal">        return;</text:p>
      <text:p text:style-name="Normal"/>
      <text:soft-page-break/>
      <text:p text:style-name="Normal">    fun(n/2);</text:p>
      <text:p text:style-name="Normal">}</text:p>
      <text:p text:style-name="Normal">Q16</text:p>
      <text:p text:style-name="Normal"/>
      <text:p text:style-name="Normal">Determine the time complexity:<text:s text:c="5"/>O(2^n)</text:p>
      <text:p text:style-name="Normal"/>
      <text:p text:style-name="Normal">void fun(int n)</text:p>
      <text:p text:style-name="Normal">{</text:p>
      <text:p text:style-name="Normal">    if(n==0)</text:p>
      <text:p text:style-name="Normal">        return;</text:p>
      <text:p text:style-name="Normal"/>
      <text:p text:style-name="Normal">    fun(n-1);</text:p>
      <text:p text:style-name="Normal">    fun(n-1);</text:p>
      <text:p text:style-name="Normal">}</text:p>
      <text:p text:style-name="Normal">Q17</text:p>
      <text:p text:style-name="Normal"/>
      <text:p text:style-name="Normal">Determine the time complexity:<text:s text:c="4"/>O(2^n)</text:p>
      <text:p text:style-name="Normal"/>
      <text:p text:style-name="Normal">int fib(int n)</text:p>
      <text:p text:style-name="Normal">{</text:p>
      <text:p text:style-name="Normal">    if(n&lt;=1)</text:p>
      <text:p text:style-name="Normal">        return n;</text:p>
      <text:p text:style-name="Normal"/>
      <text:p text:style-name="Normal">    return fib(n-1)+fib(n-2);</text:p>
      <text:p text:style-name="Normal">}</text:p>
      <text:p text:style-name="Normal">Q18</text:p>
      <text:p text:style-name="Normal"/>
      <text:p text:style-name="Normal">Determine the time complexity:<text:s text:c="6"/>O(n)</text:p>
      <text:p text:style-name="Normal"/>
      <text:p text:style-name="Normal">int fact(int n)</text:p>
      <text:p text:style-name="Normal">{</text:p>
      <text:p text:style-name="Normal">    if(n&lt;=1)</text:p>
      <text:p text:style-name="Normal">        return 1;</text:p>
      <text:p text:style-name="Normal"/>
      <text:p text:style-name="Normal">    return n*fact(n-1);</text:p>
      <text:p text:style-name="Normal">}</text:p>
      <text:p text:style-name="Normal">Q19</text:p>
      <text:p text:style-name="Normal"/>
      <text:p text:style-name="Normal">Determine the time complexity:<text:s text:c="6"/>O(n)</text:p>
      <text:p text:style-name="Normal"/>
      <text:p text:style-name="Normal">void fun(int n)</text:p>
      <text:p text:style-name="Normal">{</text:p>
      <text:p text:style-name="Normal">    if(n&lt;=0)</text:p>
      <text:p text:style-name="Normal">        return;</text:p>
      <text:p text:style-name="Normal"/>
      <text:p text:style-name="Normal">    fun(n-1);</text:p>
      <text:p text:style-name="Normal"/>
      <text:p text:style-name="Normal">    cout&lt;&lt;n;</text:p>
      <text:p text:style-name="Normal">}</text:p>
      <text:p text:style-name="Normal">Q20</text:p>
      <text:p text:style-name="Normal"/>
      <text:p text:style-name="Normal">Determine the time complexity:<text:s text:c="3"/>O(log n)</text:p>
      <text:p text:style-name="Normal"/>
      <text:p text:style-name="Normal">void fun(int n)</text:p>
      <text:p text:style-name="Normal">{</text:p>
      <text:p text:style-name="Normal">    if(n&lt;=1)</text:p>
      <text:soft-page-break/>
      <text:p text:style-name="Normal">        return;</text:p>
      <text:p text:style-name="Normal"/>
      <text:p text:style-name="Normal">    fun(n/2);</text:p>
      <text:p text:style-name="Normal"/>
      <text:p text:style-name="Normal">    cout&lt;&lt;n;</text:p>
      <text:p text:style-name="Normal">}</text:p>
      <text:p text:style-name="Normal">Q21</text:p>
      <text:p text:style-name="Normal"/>
      <text:p text:style-name="Normal">Solve the recurrence relation:<text:s text:c="2"/></text:p>
      <text:p text:style-name="Normal"/>
      <text:p text:style-name="Normal">T(n)=T(n-1)+1</text:p>
      <text:p text:style-name="Normal">Q22</text:p>
      <text:p text:style-name="Normal"/>
      <text:p text:style-name="Normal">Solve the recurrence relation:</text:p>
      <text:p text:style-name="Normal"/>
      <text:p text:style-name="Normal">T(n)=T(n-1)+n</text:p>
      <text:p text:style-name="Normal">Q23</text:p>
      <text:p text:style-name="Normal"/>
      <text:p text:style-name="Normal">Solve the recurrence relation:</text:p>
      <text:p text:style-name="Normal"/>
      <text:p text:style-name="Normal">T(n)=T(n/2)+1</text:p>
      <text:p text:style-name="Normal">Q24</text:p>
      <text:p text:style-name="Normal"/>
      <text:p text:style-name="Normal">Solve the recurrence relation:</text:p>
      <text:p text:style-name="Normal"/>
      <text:p text:style-name="Normal">T(n)=<text:span text:style-name="T2">2T</text:span>(n-1)+1</text:p>
      <text:p text:style-name="Normal">Q25</text:p>
      <text:p text:style-name="Normal"/>
      <text:soft-page-break/>
      <text:p text:style-name="Normal">Solve the recurrence relation:</text:p>
      <text:p text:style-name="Normal"/>
      <text:p text:style-name="Normal">T(n)=T(n/2)+n</text:p>
      <text:p text:style-name="Normal">Bonus GATE-Level Questions</text:p>
      <text:p text:style-name="Normal">Q26<text:s text:c="72"/>TC : O(nlog n)</text:p>
      <text:p text:style-name="Normal">for(int i=1;i&lt;=n;i++)</text:p>
      <text:p text:style-name="Normal">{</text:p>
      <text:p text:style-name="Normal">    for(int j=1;j&lt;=i;j*=2)</text:p>
      <text:p text:style-name="Normal">    {</text:p>
      <text:p text:style-name="Normal">    }</text:p>
      <text:p text:style-name="Normal">}</text:p>
      <text:p text:style-name="Normal"/>
      <text:p text:style-name="Normal">Determine the complexity.</text:p>
      <text:p text:style-name="Normal"/>
      <text:p text:style-name="Normal">Q27<text:s text:c="67"/>TC : O(nlog n)</text:p>
      <text:p text:style-name="Normal">for(int i=1;i&lt;=n;i*=2)</text:p>
      <text:p text:style-name="Normal">{</text:p>
      <text:p text:style-name="Normal">    for(int j=1;j&lt;=n;j++)</text:p>
      <text:p text:style-name="Normal">    {</text:p>
      <text:p text:style-name="Normal">    }</text:p>
      <text:p text:style-name="Normal">}</text:p>
      <text:p text:style-name="Normal"/>
      <text:p text:style-name="Normal">Determine the complexity.</text:p>
      <text:p text:style-name="Normal"/>
      <text:p text:style-name="Normal">Q28<text:s text:c="45"/>TC : O(n^2)</text:p>
      <text:p text:style-name="Normal">for(int i=n;i&gt;=1;i--)</text:p>
      <text:p text:style-name="Normal">{</text:p>
      <text:p text:style-name="Normal">    for(int j=i;j&gt;=1;j--)</text:p>
      <text:soft-page-break/>
      <text:p text:style-name="Normal">    {</text:p>
      <text:p text:style-name="Normal">    }</text:p>
      <text:p text:style-name="Normal">}</text:p>
      <text:p text:style-name="Normal"/>
      <text:p text:style-name="Normal">Determine the complexity.</text:p>
      <text:p text:style-name="Normal"/>
      <text:p text:style-name="Normal">Q29<text:s text:c="49"/>TC : O(nlog n)</text:p>
      <text:p text:style-name="Normal">for(int i=1;i&lt;=n;i++)</text:p>
      <text:p text:style-name="Normal">{</text:p>
      <text:p text:style-name="Normal">    for(int j=1;j&lt;=n;j*=2)</text:p>
      <text:p text:style-name="Normal">    {</text:p>
      <text:p text:style-name="Normal">    }</text:p>
      <text:p text:style-name="Normal">}</text:p>
      <text:p text:style-name="Normal"/>
      <text:p text:style-name="Normal">Determine the complexity.</text:p>
      <text:p text:style-name="Normal"/>
      <text:p text:style-name="Normal">Q30<text:s text:c="40"/>TC : O(n)</text:p>
      <text:p text:style-name="Normal">void fun(int n)</text:p>
      <text:p text:style-name="Normal">{</text:p>
      <text:p text:style-name="Normal">    if(n&lt;=1)</text:p>
      <text:p text:style-name="Normal">        return;</text:p>
      <text:p text:style-name="Normal"/>
      <text:p text:style-name="Normal">    fun(n/2);</text:p>
      <text:p text:style-name="Normal">    fun(n/2);</text:p>
      <text:p text:style-name="Normal">}</text:p>
      <text:p text:style-name="Normal"/>
      <text:p text:style-name="Normal">Determine the complexit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kram Jeengar</meta:initial-creator>
    <dc:creator>11816063_ME4_ Sheru Kumar</dc:creator>
    <meta:creation-date>2026-06-24T09:01:00Z</meta:creation-date>
    <dc:date>2026-06-24T09:22:00Z</dc:date>
    <meta:template xlink:href="Normal" xlink:type="simple"/>
    <meta:editing-cycles>1</meta:editing-cycles>
    <meta:editing-duration>PT1260S</meta:editing-duration>
    <meta:document-statistic meta:page-count="10" meta:paragraph-count="6" meta:word-count="499" meta:character-count="3343" meta:row-count="23" meta:non-whitespace-character-count="2850"/>
  </office:meta>
</office:document-meta>
</file>